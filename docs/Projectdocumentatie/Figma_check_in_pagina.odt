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T3" style:parent-style-name="Hyperlink" style:family="text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T6" style:parent-style-name="Hyperlink" style:family="text">
      <style:text-properties fo:language="en" fo:country="US"/>
    </style:style>
    <style:style style:name="P7" style:parent-style-name="Normal" style:family="paragraph">
      <style:text-properties fo:language="en" fo:country="US"/>
    </style:style>
  </office:automatic-styles>
  <office:body>
    <office:text text:use-soft-page-breaks="true">
      <text:p text:style-name="P1"/>
      <text:p text:style-name="Normal"/>
      <text:p text:style-name="P2">Figma check in pagina</text:p>
      <text:p text:style-name="Normal"><text:a xlink:href="https://www.figma.com/make/XtkDLxzkMoX09jprfFYWLE/Student-Check-In-Page?t=rdOwHDRo9vVd4kgU-20&amp;fullscreen=1" office:target-frame-name="_top" xlink:show="replace"><text:span text:style-name="T3">https://www.figma.com/make/XtkDLxzkMoX09jprfFYWLE/Student-Check-In-Page?t=rdOwHDRo9vVd4kgU-20&amp;fullscreen=1</text:span></text:a></text:p>
      <text:p text:style-name="P4"/>
      <text:p text:style-name="P5">Figma check out pagina</text:p>
      <text:p text:style-name="Normal"><text:a xlink:href="https://www.figma.com/make/k1NEiKaYH3w58zhJIatcB8/Student-Checkout-Page?p=f&amp;fullscreen=1" office:target-frame-name="_top" xlink:show="replace"><text:span text:style-name="T6">https://www.figma.com/make/k1NEiKaYH3w58zhJIatcB8/Student-Checkout-Page?p=f&amp;fullscreen=1</text:span></text:a></text:p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nl" fo:country="NL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 fo:language="nl" fo:country="NL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 fo:language="nl" fo:country="NL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 fo:language="nl" fo:country="NL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 fo:language="nl" fo:country="NL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 fo:language="nl" fo:country="NL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language="nl" fo:country="NL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language="nl" fo:country="NL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language="nl" fo:country="NL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language="nl" fo:country="NL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nl" fo:country="NL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 fo:language="nl" fo:country="NL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nl" fo:country="NL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 fo:language="nl" fo:country="NL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yanne Baroud</meta:initial-creator>
    <dc:creator>Rayanne Baroud</dc:creator>
    <meta:creation-date>2026-03-27T09:47:00Z</meta:creation-date>
    <dc:date>2026-03-27T09:48:00Z</dc:date>
    <meta:template xlink:href="Normal.dotm" xlink:type="simple"/>
    <meta:editing-cycles>1</meta:editing-cycles>
    <meta:editing-duration>PT60S</meta:editing-duration>
    <meta:document-statistic meta:page-count="1" meta:paragraph-count="1" meta:word-count="70" meta:character-count="468" meta:row-count="3" meta:non-whitespace-character-count="399"/>
  </office:meta>
</office:document-meta>
</file>